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2">
      <style:text-properties style:text-underline-style="none" fo:font-weight="normal" style:font-weight-asian="normal" style:font-weight-complex="normal"/>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3" style:list-style-name=""/>
    <style:style style:name="P11"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s agentes inteligentes (AI) son una parte fundamental para el juego Quassimodo. Como ya ha de saber, la manera de interactuar con este último se logra a través de un AI, y no controlando la pieza directamente. A continuación se explican detalles acerca de la creación de estos AIs de los que hablo. </text:p>
      <text:p text:style-name="Text_20_body">Lo primero que se debe tomar en cuenta es que los AIs se tienen que escribir en el lenguaje de programación <text:a xlink:type="simple" xlink:href="http://www.python.org/"><text:span text:style-name="Emphasis">Python</text:span></text:a>, versión 2.6. Lo cual nos da varias ventajas que nos facilitan la escritura de los mencionados AIs, tales como: una sintaxis clara y concisa, manejo automático de memoria y <text:span text:style-name="T1">toda</text:span> la biblioteca estandar de Python a nuestra disposición. De esta manera se puede enfocar a escribir el agente sin tener que implementar sus propias estructuras de datos, persistencia, etc, ni de liberar o reservar memoria para su agente.</text:p>
      <text:h text:style-name="Heading_20_2" text:outline-level="2">¿Cómo escribir un AI?</text:h>
      <text:p text:style-name="Text_20_body">Un AI es un archivo de Python con cualquier nombre y con extensión <text:span text:style-name="T1">.py </text:span><text:span text:style-name="T2">(ésto es importante pues si no se tiene la extensión .py, no será reconocido como un archivo válido por Quassimodo). Dicho archivo puede contener cualquier número de declaraciones </text:span><text:span text:style-name="T3">import</text:span><text:span text:style-name="T2">, y opcionalmente puede importar el módulo llamado Reglas. Ésto se debe a que, aunque no sea importado explícitamente, el módulo Reglas está de todas maneras disponible en el </text:span><text:span text:style-name="T3">namespace</text:span><text:span text:style-name="T2"> del AI.</text:span></text:p>
      <text:p text:style-name="Text_20_body"><text:span text:style-name="T2">El siguiente elemento forzoso a incluir en el archivo es </text:span><text:span text:style-name="T1">una</text:span><text:span text:style-name="T2"> clase y sólo una (si se pone más de una el comportamiento está indefinido) que herede de la clase Reglas.Agente, y tenga un constructor que al menos mande a llamar al constructor de dicha clase. Los pasos hasta ahora descritos los ejemplifico aquí:</text:span></text:p>
      <text:h text:style-name="Heading_20_3" text:outline-level="3">MiAgente.py:</text:h>
      <text:p text:style-name="P1"><text:span text:style-name="_5f_OOoComputerKeyWord">import</text:span> <text:span text:style-name="_5f_OOoComputerIdent">Reglas</text:span></text:p>
      <text:p text:style-name="P1"/>
      <text:p text:style-name="P1"><text:span text:style-name="_5f_OOoComputerKeyWord">class</text:span> <text:span text:style-name="_5f_OOoComputerIdent">AgenteDePrueba</text:span> <text:span text:style-name="_5f_OOoComputerBase">(</text:span><text:span text:style-name="_5f_OOoComputerIdent">Reglas</text:span><text:span text:style-name="_5f_OOoComputerBase">.</text:span><text:span text:style-name="_5f_OOoComputerIdent">Agente</text:span><text:span text:style-name="_5f_OOoComputerBase">):</text:span> </text:p>
      <text:p text:style-name="P1"><text:s text:c="4"/><text:span text:style-name="_5f_OOoComputerKeyWord">def</text:span> <text:span text:style-name="_5f_OOoComputerIdent">__init__</text:span><text:span text:style-name="_5f_OOoComputerBase">(</text:span><text:span text:style-name="_5f_OOoComputerIdent">self</text:span><text:span text:style-name="_5f_OOoComputerBase">):</text:span> </text:p>
      <text:p text:style-name="P1"><text:s text:c="8"/><text:span text:style-name="_5f_OOoComputerIdent">Reglas</text:span><text:span text:style-name="_5f_OOoComputerBase">.</text:span><text:span text:style-name="_5f_OOoComputerIdent">Agente</text:span><text:span text:style-name="_5f_OOoComputerBase">.</text:span><text:span text:style-name="_5f_OOoComputerIdent">__init__</text:span><text:span text:style-name="_5f_OOoComputerBase">(</text:span><text:span text:style-name="_5f_OOoComputerIdent">self</text:span><text:span text:style-name="_5f_OOoComputerBase">)</text:span></text:p>
      <text:p text:style-name="P1"/>
      <text:p text:style-name="P1">Aparte de esta clase, el usuario puede definir cuantas clases desee mientras éstas no hereden de Reglas.Agente.</text:p>
      <text:p text:style-name="P1">La clase Reglas.Agente es una clase abstracta. Es decir, contiene la declaración de varios métodos, pero no una implementación para ninguno. Es responsabilidad del usuario implementar cada uno de ellos <text:s/>para que el agente sea válido y pueda jugar. Los métodos a implementar son:</text:p>
      <text:list xml:id="list1987198350" text:style-name="L1">
        <text:list-item>
          <text:p text:style-name="P3"><text:span text:style-name="_5f_OOoComputerIdent">iniciar</text:span><text:span text:style-name="_5f_OOoComputerBase">(</text:span><text:span text:style-name="_5f_OOoComputerIdent">self</text:span><text:span text:style-name="_5f_OOoComputerBase">,</text:span> <text:span text:style-name="_5f_OOoComputerIdent">id</text:span><text:span text:style-name="_5f_OOoComputerBase">):</text:span></text:p>
          <text:list>
            <text:list-item>
              <text:p text:style-name="P2"><text:span text:style-name="T2">Este método es llamado antes de iniciar la partida. El AI es informado de su id</text:span><text:span text:style-name="T2"><text:note text:id="ftn1" text:note-class="footnote"><text:note-citation>1</text:note-citation><text:note-body><text:p text:style-name="Footnote">El id de un jugador es un número entero (int en Python) que nos indica el número de jugador que le corresponde a un AI. Un id igual a cero, indica que se es el primer jugador, y por tanto se realiza la primera jugada; mientras que un id igual a uno indica que se es el segundo jugador y por tanto se realiza la primera jugada después de que el primero la ha hecho.</text:p></text:note-body></text:note></text:span><text:span text:style-name="T2"> de jugador, que nos es útil para obtener información tal como la meta que se trata de alcanzar para ganar el juego. El método puede ser usado para inicializar recursos que serán usados a lo largo de la partida. </text:span><text:span text:style-name="T1">No regresa nada</text:span><text:span text:style-name="T2">.</text:span></text:p>
            </text:list-item>
          </text:list>
        </text:list-item>
        <text:list-item>
          <text:p text:style-name="P3"><text:soft-page-break/><text:span text:style-name="_5f_OOoComputerIdent">siguienteJugada</text:span><text:span text:style-name="_5f_OOoComputerBase">(</text:span><text:span text:style-name="_5f_OOoComputerIdent">self</text:span><text:span text:style-name="_5f_OOoComputerBase">):</text:span></text:p>
          <text:list>
            <text:list-item>
              <text:p text:style-name="P3">Este método es llamado cuando le toca el turno de hacer una jugada al AI. Aquí el AI debe crear un objeto tipo Reglas.Jugada con la información de la jugada que desee realizar y regresarlo. El usuario debe tener cuidado de que su jugada no rompa las reglas, ni que su código dispare alguna excepción de Python, pues esto resultaría en un lfina de partida anticipado, haciendo perder al AI que cometió dicha falta.</text:p>
            </text:list-item>
          </text:list>
        </text:list-item>
        <text:list-item>
          <text:p text:style-name="P3"><text:span text:style-name="_5f_OOoComputerIdent">terminar</text:span><text:span text:style-name="_5f_OOoComputerBase">(</text:span><text:span text:style-name="_5f_OOoComputerIdent">self</text:span><text:span text:style-name="_5f_OOoComputerBase">):</text:span></text:p>
          <text:list>
            <text:list-item>
              <text:p text:style-name="P2"><text:span text:style-name="T2">Éste método es llamado al terminar la partida. Puede ser usado para liberar los recursos usados por el AI. </text:span><text:span text:style-name="T1">Por el momento no regresa nada</text:span><text:span text:style-name="T2">, pero se planea que el usuario pueda regresar un mensaje para ser desplegado en pantalla en versiones futuras.</text:span></text:p>
            </text:list-item>
          </text:list>
        </text:list-item>
      </text:list>
      <text:h text:style-name="P11" text:outline-level="2">El API.</text:h>
      <text:p text:style-name="P1">Para poder hacer un AI que haga algo más que moverse o colocar una barrera en alguna posición aleatoria, es necesario obtener información acerca del estado del tablero del juego, y del estado de la partida. Para esto se le expone al AI un conjunto de clases y objetos que le permiten conocer (con distintos grados de control y complejidad) el estado de la partida y del tablero. A continuación se describen las clases y objetos expuestos al AI:</text:p>
      <text:h text:style-name="P10" text:outline-level="3">Clases:</text:h>
      <text:list xml:id="list1700720885" text:style-name="L2">
        <text:list-item>
          <text:p text:style-name="P4">Reglas.Agente:</text:p>
          <text:list>
            <text:list-item>
              <text:p text:style-name="P4">Clase abstracta. No se pueden crear instancias de ésta, solamente derivar de ella e implementar los métodos descritos anteriormente.</text:p>
            </text:list-item>
          </text:list>
        </text:list-item>
        <text:list-item>
          <text:p text:style-name="P4">Reglas.AyudanteDeAgente:</text:p>
          <text:list>
            <text:list-item>
              <text:p text:style-name="P4">Esta clase provee métodos de ayuda a un Agente, dado el tablero con el cual se construyó. Dichos métodos son:</text:p>
              <text:list>
                <text:list-item>
                  <text:p text:style-name="P5"><text:span text:style-name="_5f_OOoComputerIdent"><text:span text:style-name="T2">__init__</text:span></text:span><text:span text:style-name="_5f_OOoComputerBase"><text:span text:style-name="T2">(</text:span></text:span><text:span text:style-name="_5f_OOoComputerIdent"><text:span text:style-name="T2">tablero</text:span></text:span><text:span text:style-name="_5f_OOoComputerBase"><text:span text:style-name="T2">):</text:span></text:span><text:span text:style-name="T2"> Constructor, recibe un objeto Tablero y </text:span><text:span text:style-name="T1">guarda una copia de él</text:span><text:span text:style-name="T2">.</text:span></text:p>
                </text:list-item>
                <text:list-item>
                  <text:p text:style-name="P5"><text:span text:style-name="_5f_OOoComputerIdent"><text:span text:style-name="T2">getMovimientosPosibles</text:span></text:span><text:span text:style-name="_5f_OOoComputerBase"><text:span text:style-name="T2">(</text:span></text:span><text:span text:style-name="_5f_OOoComputerIdent"><text:span text:style-name="T2">idJugador</text:span></text:span><text:span text:style-name="_5f_OOoComputerBase"><text:span text:style-name="T2">):</text:span></text:span><text:span text:style-name="T2"> Regresa una lista de objetos tipo Jugada, con todos los movimientos disponibles para el AI con id </text:span><text:span text:style-name="T3">idJugador</text:span><text:span text:style-name="T2">.</text:span></text:p>
                </text:list-item>
                <text:list-item>
                  <text:p text:style-name="P5"><text:span text:style-name="_5f_OOoComputerIdent"><text:span text:style-name="T2">getBarrerasPosibles</text:span></text:span><text:span text:style-name="_5f_OOoComputerBase"><text:span text:style-name="T2">(</text:span></text:span><text:span text:style-name="_5f_OOoComputerIdent"><text:span text:style-name="T4">idJugador</text:span></text:span><text:span text:style-name="_5f_OOoComputerBase"><text:span text:style-name="T2">):</text:span></text:span><text:span text:style-name="T2"> Regresa una lista de objetos tipo Jugada, que describen todas las barreras (y direcciones de éstas) en las que el AI de id idJugador puede colocar alguna barrera. En caso de que el AI haya colocado ya sus diez barreras, se regresa una lista vacía.</text:span></text:p>
                </text:list-item>
              </text:list>
            </text:list-item>
          </text:list>
        </text:list-item>
        <text:list-item>
          <text:p text:style-name="P4">Reglas.Barrera:</text:p>
          <text:list>
            <text:list-item>
              <text:p text:style-name="P5"><text:span text:style-name="T2">Esta clase representa a una barrera que se puede colocar o está colocada en un tablero. Tiene 4 propiedades: posicion, puntoMedio, punta y direccion. De los cuales la “posicion” nos indica el punto (x, y) sobre el cual está colocado el extremo inicial de la barrera. El “puntoMedio” nos indica el punto (x, y) sobre el cual está la el punto a la mitad de la barrera. “punta” nos indica el punto (x, y) sobre el que está colocado el extremo final de la barrera. “dirección” es un valor del enum Reglas.Direccion que nos indica la orientación del extremo final de la barrera (</text:span><text:span text:style-name="T1">solamente puede colocarse una barrera en dirección </text:span><text:soft-page-break/><text:span text:style-name="T1">NORTE o SUR</text:span><text:span text:style-name="T2">). </text:span></text:p>
            </text:list-item>
            <text:list-item>
              <text:p text:style-name="P5"><text:span text:style-name="T2">Para ejemplificar como funciona la colocación de barreras, supongamos que en </text:span><text:span text:style-name="_5f_OOoComputerIdent"><text:span text:style-name="T2">siguienteJugada</text:span></text:span><text:span text:style-name="_5f_OOoComputerBase"><text:span text:style-name="T2">()</text:span></text:span><text:span text:style-name="T2"> regresamos una jugada tipo BARRERA, con dirección NORTE con la posición (1, 1):</text:span></text:p>
              <text:p text:style-name="P5"><text:span text:style-name="T2"><text:line-break/></text:span><text:span text:style-name="_5f_OOoComputerIdent"><text:span text:style-name="T2">j</text:span></text:span><text:span text:style-name="T2"> </text:span><text:span text:style-name="_5f_OOoComputerBase"><text:span text:style-name="T2">=</text:span></text:span><text:span text:style-name="T2"> </text:span><text:span text:style-name="_5f_OOoComputerIdent"><text:span text:style-name="T2">Reglas</text:span></text:span><text:span text:style-name="_5f_OOoComputerBase"><text:span text:style-name="T2">.</text:span></text:span><text:span text:style-name="_5f_OOoComputerIdent"><text:span text:style-name="T2">Jugada</text:span></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TipoDeJugada</text:span></text:span><text:span text:style-name="_5f_OOoComputerBase"><text:span text:style-name="T2">(</text:span></text:span><text:span text:style-name="_5f_OOoComputerIdent"><text:span text:style-name="T2">Reglas</text:span></text:span><text:span text:style-name="_5f_OOoComputerBase"><text:span text:style-name="T2">.</text:span></text:span><text:span text:style-name="_5f_OOoComputerIdent"><text:span text:style-name="T2">TipoDeJugada</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Posicion</text:span></text:span><text:span text:style-name="_5f_OOoComputerBase"><text:span text:style-name="T2">(</text:span></text:span><text:span text:style-name="T2"> </text:span><text:span text:style-name="_5f_OOoComputerBase"><text:span text:style-name="T2">(</text:span></text:span><text:span text:style-name="_5f_OOoComputerLiteral"><text:span text:style-name="T2">1</text:span></text:span><text:span text:style-name="_5f_OOoComputerBase"><text:span text:style-name="T2">,</text:span></text:span><text:span text:style-name="T2"> </text:span><text:span text:style-name="_5f_OOoComputerLiteral"><text:span text:style-name="T2">1</text:span></text:span><text:span text:style-name="_5f_OOoComputerBase"><text:span text:style-name="T2">)</text:span></text:span><text:span text:style-name="T2"> </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Direccion</text:span></text:span><text:span text:style-name="_5f_OOoComputerBase"><text:span text:style-name="T2">(</text:span></text:span><text:span text:style-name="T2"> </text:span><text:span text:style-name="_5f_OOoComputerIdent"><text:span text:style-name="T2">Reglas</text:span></text:span><text:span text:style-name="_5f_OOoComputerBase"><text:span text:style-name="T2">.</text:span></text:span><text:span text:style-name="_5f_OOoComputerIdent"><text:span text:style-name="T2">Direccion</text:span></text:span><text:span text:style-name="_5f_OOoComputerBase"><text:span text:style-name="T2">.</text:span></text:span><text:span text:style-name="_5f_OOoComputerIdent"><text:span text:style-name="T2">NORTE</text:span></text:span><text:span text:style-name="T2"> </text:span><text:span text:style-name="_5f_OOoComputerBase"><text:span text:style-name="T2">)</text:span></text:span><text:span text:style-name="T2"><text:line-break/></text:span><text:span text:style-name="_5f_OOoComputerKeyWord"><text:span text:style-name="T2">return</text:span></text:span><text:span text:style-name="T2"> </text:span><text:span text:style-name="_5f_OOoComputerIdent"><text:span text:style-name="T2">j</text:span></text:span></text:p>
              <text:p text:style-name="P5"><text:span text:style-name="T2">De ser ésta una jugada válida, la barrera se colocará en el tablero del juego en curso, bloqueando el lado OESTE (izquierdo) de las </text:span><text:bookmark-start text:name="__DdeLink__702_254221840"/><text:span text:style-name="T2">celdas que están colocadas en la posición (1, 1) y (1, 2)</text:span><text:bookmark-end text:name="__DdeLink__702_254221840"/><text:span text:style-name="T2"> y el lado ESTE (derecho) de las celdas que están colocadas en la posición (0, 1) y (0, 2).<text:line-break/>//TODO: imagen de ejemplo.<text:line-break/><text:line-break/>Si en lugar de poner la barrera en dirección NORTE, se pusiera en dirección ESTE, se bloquearían el lado SUR (abajo) de las celdas que están colocadas en la posición (1, 1) y (2, 1), y el lado NORTE (arriba) de las celdas que están colocadas en la posición (1, 0) y (2, 0).<text:line-break/>//TODO: imagen de ejemplo.</text:span></text:p>
            </text:list-item>
            <text:list-item>
              <text:p text:style-name="P4">La clase cuenta con dos constructores: </text:p>
              <text:list>
                <text:list-item>
                  <text:p text:style-name="P5"><text:span text:style-name="_5f_OOoComputerIdent"><text:span text:style-name="T2">Reglas</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T2"> Constructor default, que crea un objeto barrera con “direccion” NORTE, con “posicion” (-1, -1), y la pone como no colocada.</text:span></text:p>
                </text:list-item>
                <text:list-item>
                  <text:p text:style-name="P5"><text:span text:style-name="_5f_OOoComputerIdent"><text:span text:style-name="T2">Reglas</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_5f_OOoComputerIdent"><text:span text:style-name="T2">jugada</text:span></text:span><text:span text:style-name="_5f_OOoComputerBase"><text:span text:style-name="T2">):</text:span></text:span><text:span text:style-name="T2"> Donde “jugada” es un objeto tipo Reglas.Jugada. Crea una barrera a partir de una jugada ya construida. Pone la barrera como colocada.</text:span></text:p>
                </text:list-item>
              </text:list>
            </text:list-item>
            <text:list-item>
              <text:p text:style-name="P4">La clase define los siguientes métodos para acceder a estas propiedades:</text:p>
              <text:list>
                <text:list-item>
                  <text:p text:style-name="P4"><text:span text:style-name="_5f_OOoComputerIdent">colocar</text:span><text:span text:style-name="_5f_OOoComputerBase">(</text:span><text:span text:style-name="_5f_OOoComputerIdent">pos</text:span><text:span text:style-name="_5f_OOoComputerBase">,</text:span> <text:span text:style-name="_5f_OOoComputerIdent">direccion</text:span><text:span text:style-name="_5f_OOoComputerBase">):</text:span> Pone la barrera con la “posicion” pos. Calcula y pone “puntoMedio” y “punta” usando la “direccion” proporcionada. Esta última es también puesta al valor del parámetro “direccion”. “pos” es una tupla de dos enteros (x, y) que describen la posición en la que se desea la barrera, y “direccion” es un <text:s/>valor del enum Reglas.Direccion.</text:p>
                </text:list-item>
                <text:list-item>
                  <text:p text:style-name="P4"><text:span text:style-name="_5f_OOoComputerIdent">colocar</text:span><text:span text:style-name="_5f_OOoComputerBase">(</text:span><text:span text:style-name="_5f_OOoComputerIdent">x</text:span><text:span text:style-name="_5f_OOoComputerBase">,</text:span> <text:span text:style-name="_5f_OOoComputerIdent">y</text:span><text:span text:style-name="_5f_OOoComputerBase">,</text:span> <text:span text:style-name="_5f_OOoComputerIdent">direccion</text:span><text:span text:style-name="_5f_OOoComputerBase">):</text:span> Similar al método anterior, solamente que en lugar de recibir la “posicion” como una tupla de enteros, los recibe a cada uno independientemente. “x” y “y” son dichos enteros.</text:p>
                </text:list-item>
                <text:list-item>
                  <text:p text:style-name="P4"><text:span text:style-name="_5f_OOoComputerIdent">getDireccion</text:span><text:span text:style-name="_5f_OOoComputerBase">():</text:span> Regresa la “direccion” en la que fue colocada la Barrera, como un valor del enum Reglas.Direccion.</text:p>
                </text:list-item>
                <text:list-item>
                  <text:p text:style-name="P5"><text:span text:style-name="_5f_OOoComputerIdent"><text:span text:style-name="T2">getPuntoMedio</text:span></text:span><text:span text:style-name="_5f_OOoComputerBase"><text:span text:style-name="T2">():</text:span></text:span><text:span text:style-name="T2"> </text:span><text:bookmark-start text:name="__DdeLink__0_280358462"/><text:span text:style-name="T2">Regresa una tupla de dos enteros (x, y) con la posición del “puntoMedio” de la barrera.</text:span><text:bookmark-end text:name="__DdeLink__0_280358462"/></text:p>
                </text:list-item>
                <text:list-item>
                  <text:p text:style-name="P4"><text:span text:style-name="_5f_OOoComputerIdent">GetPunta</text:span><text:span text:style-name="_5f_OOoComputerBase">():</text:span> Regresa una tupla de dos enteros (x, y) con la posición de la “punta” de la barrera.</text:p>
                </text:list-item>
              </text:list>
            </text:list-item>
            <text:list-item>
              <text:p text:style-name="P4">Adicionalmente, la clase tiene un operador de asignación sobrecargado para copiar todos los <text:soft-page-break/>datos desde otro objeto Barrera.</text:p>
            </text:list-item>
            <text:list-item>
              <text:p text:style-name="P5"><text:span text:style-name="T2">Cabe mencionar que si se trata de colocar una Barrera con una “direccion” distinta a </text:span><text:bookmark-start text:name="__DdeLink__602_254221840"/><text:span text:style-name="T2">Reglas.Direccion.ESTE</text:span><text:bookmark-end text:name="__DdeLink__602_254221840"/><text:span text:style-name="T2"> o <text:s/>Reglas.Direccion.NORTE, se levanta la excepción Reglas.ParametrosMalos.</text:span></text:p>
            </text:list-item>
            <text:list-item>
              <text:p text:style-name="P4">Si se trata de usar cualquier getter y la barrera aún no está colocada, se levanta la excepción Reglas.PiezaNoColocada.</text:p>
            </text:list-item>
          </text:list>
        </text:list-item>
        <text:list-item>
          <text:p text:style-name="P4">Reglas.Celda:</text:p>
          <text:list>
            <text:list-item>
              <text:p text:style-name="P4">Esta clase representa a una celda del tablero de juego. Hereda de la clase Reglas.Pieza, así que comparte todas sus propiedades y métodos. </text:p>
            </text:list-item>
            <text:list-item>
              <text:p text:style-name="P4">Tiene dos constructores:</text:p>
              <text:list>
                <text:list-item>
                  <text:p text:style-name="P4"><text:span text:style-name="_5f_OOoComputerIdent">Reglas</text:span><text:span text:style-name="_5f_OOoComputerBase">.</text:span><text:span text:style-name="_5f_OOoComputerIdent">Celda</text:span><text:span text:style-name="_5f_OOoComputerBase">():</text:span> Constructor default. Que crea una celda con una “posicion” de (-1, -1), con todos sus lados bloqueados, no colocada, y libre.</text:p>
                </text:list-item>
                <text:list-item>
                  <text:p text:style-name="P6"><text:span text:style-name="_5f_OOoComputerIdent">Reglas</text:span><text:span text:style-name="_5f_OOoComputerBase">.</text:span><text:span text:style-name="_5f_OOoComputerIdent">Celda</text:span><text:span text:style-name="_5f_OOoComputerBase">(</text:span><text:span text:style-name="_5f_OOoComputerIdent">jugada</text:span><text:span text:style-name="_5f_OOoComputerBase">):</text:span> Donde “jugada” es un objeto de tipo Reglas.Jugada. Similar al constructor anterior, pero pone la “posicion” de la celda igual a la de “jugada”.</text:p>
                </text:list-item>
              </text:list>
            </text:list-item>
            <text:list-item>
              <text:p text:style-name="P4">Adicionalmente tiene otros métodos que ahora se describirán:</text:p>
              <text:list>
                <text:list-item>
                  <text:p text:style-name="P4"><text:span text:style-name="_5f_OOoComputerIdent">estaLibre</text:span><text:span text:style-name="_5f_OOoComputerBase">():</text:span> Regresa False si la celda está siendo ocupada por un AI en ese momento, False de lo contrario.</text:p>
                </text:list-item>
                <text:list-item>
                  <text:p text:style-name="P4"><text:span text:style-name="_5f_OOoComputerIdent">getHijo</text:span><text:span text:style-name="_5f_OOoComputerBase">(</text:span><text:span text:style-name="_5f_OOoComputerIdent">direccion</text:span><text:span text:style-name="_5f_OOoComputerBase">):</text:span> Regresa a la celda que está directamente a un lado de la celda, en la dirección “dirección”. Si no hay una celda en esa dirección, o esa dirección está bloqueada por una barrera, se levanta la excepción “SinHijo”. “direccion” es un valor del enum Reglas.Direccion.</text:p>
                </text:list-item>
                <text:list-item>
                  <text:p text:style-name="P4"><text:span text:style-name="_5f_OOoComputerIdent">estaLibreDireccion</text:span><text:span text:style-name="_5f_OOoComputerBase">(</text:span><text:span text:style-name="_5f_OOoComputerIdent">direccion</text:span><text:span text:style-name="_5f_OOoComputerBase">):</text:span> Nos informa si la dirección indicada por “direcccion” está libre o bloqueada por una barrera. Regresa True en caso de que la dirección esté libre y False en caso de que la dirección esté bloqueada o no exista una celda hacia esa dirección.</text:p>
                </text:list-item>
              </text:list>
            </text:list-item>
          </text:list>
        </text:list-item>
        <text:list-item>
          <text:p text:style-name="P4">Reglas.Jugada:</text:p>
          <text:list>
            <text:list-item>
              <text:p text:style-name="P4">Esta clase representa la intención de un AI de representar cierta jugada. Debe regresarse una instancia de esta clase desde el método Reglas.Agente.siguienteJugada. Tiene 3 propiedades: posicion, tipoDeJugada y direccion. <text:s/>Hay dos tipos de Jugada, MOVIMIENTO y BARRERA, ambos valores del enum TipoDeJugada. En ambos casos, la propiedad “posicion” se empata con la propiedad “posicion” de Reglas.Celda y Reglas.Barrera respectivamente, y representa la Celda a la que se quiere mover, o el lugar donde se quiere colocar la barrera. “direccion” es ignorada cuando se trata de un tipo de jugada MOVIMIENTO. Los métodos para modificar dichas propiedades son:</text:p>
              <text:list>
                <text:list-item>
                  <text:p text:style-name="P4"><text:span text:style-name="_5f_OOoComputerIdent">setPosicion</text:span><text:span text:style-name="_5f_OOoComputerBase">(</text:span><text:span text:style-name="_5f_OOoComputerIdent">pos</text:span><text:span text:style-name="_5f_OOoComputerBase">):</text:span> Coloca la “posicion” de la jugada en la posición dada por pos. “pos” es una tupla de dos enteros (x, y).</text:p>
                </text:list-item>
                <text:list-item>
                  <text:p text:style-name="P4"><text:span text:style-name="_5f_OOoComputerIdent">setPosicion</text:span><text:span text:style-name="_5f_OOoComputerBase">(</text:span><text:span text:style-name="_5f_OOoComputerIdent">x</text:span><text:span text:style-name="_5f_OOoComputerBase">,</text:span> <text:span text:style-name="_5f_OOoComputerIdent">y</text:span><text:span text:style-name="_5f_OOoComputerBase">):</text:span> Similar al anterior método, sólo que recibe la “posicion” como dos enteros distintos.</text:p>
                </text:list-item>
                <text:list-item>
                  <text:p text:style-name="P4"><text:span text:style-name="_5f_OOoComputerIdent">getPosicion</text:span><text:span text:style-name="_5f_OOoComputerBase">():</text:span> <text:s/>Nos regresa un iterable de dos enteros, que representan la posición <text:soft-page-break/>de la Jugada.</text:p>
                </text:list-item>
                <text:list-item>
                  <text:p text:style-name="P4"><text:span text:style-name="_5f_OOoComputerIdent">setTipoDeJugada</text:span><text:span text:style-name="_5f_OOoComputerBase">(</text:span><text:span text:style-name="_5f_OOoComputerIdent">tipo</text:span><text:span text:style-name="_5f_OOoComputerBase">):</text:span> Pone la propiedad “tipoDeJugada” al valor “tipo”. “tipo” es un valor del enum Reglas.TipoDeJugada.</text:p>
                </text:list-item>
                <text:list-item>
                  <text:p text:style-name="P4"><text:span text:style-name="_5f_OOoComputerIdent">getTipoDeJugada</text:span><text:span text:style-name="_5f_OOoComputerBase">():</text:span> Nos informa del tipo de jugada de una instancia de Reglas.Jugada. Nos regresa un valor del enum Reglas.TipoDeJugada.</text:p>
                </text:list-item>
                <text:list-item>
                  <text:p text:style-name="P4"><text:span text:style-name="_5f_OOoComputerIdent">setDireccion</text:span><text:span text:style-name="_5f_OOoComputerBase">(</text:span><text:span text:style-name="_5f_OOoComputerIdent">dir</text:span><text:span text:style-name="_5f_OOoComputerBase">):</text:span> Pone la propiedad “direccion” al valor “dir”. “dir” debe ser un valor del enum Reglas.Direccion. Tomar en cuenta que para un tipo de jugada BARRERA, sólo son válidas las direcciones ESTE y NORTE.</text:p>
                </text:list-item>
                <text:list-item>
                  <text:p text:style-name="P4"><text:span text:style-name="_5f_OOoComputerIdent">getDireccion</text:span><text:span text:style-name="_5f_OOoComputerBase">():</text:span> Nos informa de la dirección de una instancia de Reglas.Jugada. Nos regresa un valor de enum Reglas.Direccion</text:p>
                </text:list-item>
              </text:list>
            </text:list-item>
          </text:list>
        </text:list-item>
        <text:list-item>
          <text:p text:style-name="P4">Reglas.Pieza:</text:p>
          <text:list>
            <text:list-item>
              <text:p text:style-name="P4">Esta es una clase abstracta, de la que heredan Reglas.Celda y Reglas.Barrera, así que todas las propiedades y métodos de Reglas.Pieza son compartidas con estas dos últimas.</text:p>
            </text:list-item>
            <text:list-item>
              <text:p text:style-name="P4">Sólo tiene una propiedad, “posicion”, y un getter:</text:p>
              <text:list>
                <text:list-item>
                  <text:p text:style-name="P4"><text:span text:style-name="_5f_OOoComputerIdent">getPosicion</text:span><text:span text:style-name="_5f_OOoComputerBase">():</text:span> Que regresa un iterable que contiene dos enteros con la posición de la pieza.</text:p>
                </text:list-item>
              </text:list>
            </text:list-item>
            <text:list-item>
              <text:p text:style-name="P4">Esta clase tiene sobrecargado el operador de igualdad para que compare las posiciones de las piezas.</text:p>
            </text:list-item>
          </text:list>
        </text:list-item>
        <text:list-item>
          <text:p text:style-name="P4">Reglas.Tablero:</text:p>
          <text:list>
            <text:list-item>
              <text:p text:style-name="P4">Esta clase representa un tablero de juego, y mantiene el estado de éste durante toda la duración de la partida. Contiene toda la información del estado del tablero del juego, tal como las barreras colocadas, el conjunto de celdas (y cada una de éstas conteniendo información individual de su estado), la posición de los jugadores, etc.</text:p>
            </text:list-item>
            <text:list-item>
              <text:p text:style-name="P4">Se proveen dos constructores:</text:p>
              <text:list>
                <text:list-item>
                  <text:p text:style-name="P4"><text:span text:style-name="_5f_OOoComputerIdent">Tablero</text:span><text:span text:style-name="_5f_OOoComputerBase">():</text:span> Constructor default. Crea un tablero vacío. No es muy útil para los agentes.</text:p>
                </text:list-item>
                <text:list-item>
                  <text:p text:style-name="P4"><text:span text:style-name="_5f_OOoComputerIdent">Tablero</text:span><text:span text:style-name="_5f_OOoComputerBase">(</text:span><text:span text:style-name="_5f_OOoComputerIdent">tablero</text:span><text:span text:style-name="_5f_OOoComputerBase">):</text:span> Este constructor crea un tablero haciendo una copia profunda de otro tablero. Este es el constructor más útil, pues nos permite hacer copias del tablero del juego y modificarlo a nuestro gusto para probar posibles jugadas.</text:p>
                </text:list-item>
              </text:list>
            </text:list-item>
            <text:list-item>
              <text:p text:style-name="P4">La clase contiene métodos que nos dan acceso a las distintas propiedades del tablero. Dichos métodos son:</text:p>
              <text:list>
                <text:list-item>
                  <text:p text:style-name="P4">getPosicion(idJugador): Nos devuelve la posición del jugador con id “idJugador” en el tablero. La posición se regresa como una tupla de dos enteros.</text:p>
                </text:list-item>
                <text:list-item>
                  <text:p text:style-name="P4">getBarrerasColocadas(): Nos regresa una lista de las barreras colocadas en el tablero.</text:p>
                </text:list-item>
                <text:list-item>
                  <text:p text:style-name="P4">getMetas(idJugador): Nos regresa una lista de las celdas que sirven como meta al jugador con id “idJugador”.</text:p>
                </text:list-item>
                <text:list-item>
                  <text:p text:style-name="P4">getCelda(idJugador): Nos regresa la celda sobre la que el jugador con id “idJugador” está colocado.</text:p>
                </text:list-item>
                <text:list-item>
                  <text:p text:style-name="P4"><text:soft-page-break/>moverJugador(idJugador, x, y): Mueve el jugador con id “idJugador” desde su celda actual, a la celda en posicion (x, y). Los tres parámetros son enteros.</text:p>
                </text:list-item>
                <text:list-item>
                  <text:p text:style-name="P4">setBarrera(idJugador, barrera): Provoca que el jugador con id “idJugador” coloque una barrera en el tablero. “barrera” es un objeto tipo barrera.</text:p>
                </text:list-item>
              </text:list>
            </text:list-item>
          </text:list>
        </text:list-item>
      </text:list>
      <text:h text:style-name="Heading_20_3" text:outline-level="3">Enums:</text:h>
      <text:list xml:id="list510089802" text:style-name="L3">
        <text:list-item>
          <text:p text:style-name="P7">Reglas.TipoDeJugada: Contiene los tipos de los que puede ser una jugada.</text:p>
          <text:list>
            <text:list-item>
              <text:p text:style-name="P7">BARRERA</text:p>
            </text:list-item>
            <text:list-item>
              <text:p text:style-name="P7">MOVIMIENTO</text:p>
            </text:list-item>
          </text:list>
        </text:list-item>
        <text:list-item>
          <text:p text:style-name="P7">Reglas.Direccion: Enumera las posibles direcciones y los lados que rodean a una celda.</text:p>
          <text:list>
            <text:list-item>
              <text:p text:style-name="P7">NORTE</text:p>
            </text:list-item>
            <text:list-item>
              <text:p text:style-name="P7">ESTE</text:p>
            </text:list-item>
            <text:list-item>
              <text:p text:style-name="P7">SUR</text:p>
            </text:list-item>
            <text:list-item>
              <text:p text:style-name="P7">OESTE</text:p>
            </text:list-item>
          </text:list>
        </text:list-item>
      </text:list>
      <text:h text:style-name="Heading_20_3" text:outline-level="3">Excepciones:</text:h>
      <text:list xml:id="list331888143" text:style-name="L4">
        <text:list-item>
          <text:p text:style-name="P8">ParametrosMalos: Excepción levantada por algunos métodos al mandarle parámetros mal formados.</text:p>
        </text:list-item>
        <text:list-item>
          <text:p text:style-name="P8">SinHijo: Excepción levantada cuando se pide la celda hijo de una celda, pero la dirección solicitada está bloqueada.</text:p>
        </text:list-item>
        <text:list-item>
          <text:p text:style-name="P8">PiezaNoColocada: Excepción levantada por algunos métodos al tratar de manipular ciertas piezas que no han sido colocadas en el tablero.</text:p>
        </text:list-item>
      </text:list>
      <text:h text:style-name="Heading_20_3" text:outline-level="3">Objetos:</text:h>
      <text:p text:style-name="Text_20_body">Hay algunos objetos globales que están disponibles en todo momento a los agentes. Éstos son:</text:p>
      <text:list xml:id="list643185985" text:style-name="L5">
        <text:list-item>
          <text:p text:style-name="P9">tablero: Este es un objeto de tipo Reglas.Tablero que representa al tablero de la partida en curso. Se le han deshabilitado los métodos moverJugador y setBarrera para evitar que el jugador modifique el tablero del juego, así que cualquier intento por llamar dichos métodos en este objeto, termina en una excepción y por lo tanto, en el fin de la partida.</text:p>
        </text:list-item>
        <text:list-item>
          <text:p text:style-name="P9">ayudante: Este es un objeto de tipo Reglas.AyudanteDeAgente, inicializado con el tablero de la partida, y siempre actualizado a é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rizio Hernández</meta:initial-creator>
    <meta:creation-date>2010-05-07T11:00:45</meta:creation-date>
    <dc:date>2010-05-13T11:17:56</dc:date>
    <dc:creator>Fabrizio Hernández</dc:creator>
    <meta:editing-duration>PT06H06M38S</meta:editing-duration>
    <meta:editing-cycles>43</meta:editing-cycles>
    <meta:generator>OpenOffice.org/3.2$Linux OpenOffice.org_project/320m12$Build-9483</meta:generator>
    <meta:document-statistic meta:table-count="0" meta:image-count="0" meta:object-count="0" meta:page-count="6" meta:paragraph-count="98" meta:word-count="2372" meta:character-count="14014"/>
  </office:meta>
</office:document-meta>
</file>